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9c5d" officeooo:paragraph-rsid="001e9c5d"/>
    </style:style>
    <style:style style:name="P2" style:family="paragraph" style:parent-style-name="Standard">
      <style:text-properties officeooo:rsid="002018a0" officeooo:paragraph-rsid="002018a0"/>
    </style:style>
    <style:style style:name="P3" style:family="paragraph" style:parent-style-name="Standard">
      <style:text-properties officeooo:rsid="001cf67d" officeooo:paragraph-rsid="001cf67d"/>
    </style:style>
    <style:style style:name="T1" style:family="text">
      <style:text-properties officeooo:rsid="002018a0"/>
    </style:style>
    <style:style style:name="T2" style:family="text">
      <style:text-properties officeooo:rsid="001cf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 dnia 28.05.26</text:p>
      <text:p text:style-name="Standard">CEL: GRA W STATKI</text:p>
      <text:p text:style-name="Standard"/>
      <text:p text:style-name="Standard">29.05 wybieranie miejsc statków przez gracza</text:p>
      <text:p text:style-name="P3">6.06 wybieranie miejsc statków przez komputer<text:tab/></text:p>
      <text:p text:style-name="P1">7.06 poprawki tego co było<text:tab/><text:span text:style-name="T2">---&gt;</text:span><text:span text:style-name="T1">internet – jak tworzyć funkcje</text:span></text:p>
      <text:p text:style-name="P1">8.06 początek strzelania</text:p>
      <text:p text:style-name="P2">11.06 funkcja strzelanie gracza począte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ek W</meta:initial-creator>
    <meta:editing-cycles>6</meta:editing-cycles>
    <meta:creation-date>2026-05-28T07:20:00</meta:creation-date>
    <dc:date>2026-06-11T15:10:12.344000000</dc:date>
    <meta:editing-duration>PT41M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7" meta:word-count="37" meta:character-count="251" meta:non-whitespace-character-count="220"/>
    <meta:user-defined meta:name="AppVersion">12.0000</meta:user-defined>
    <meta:template xlink:type="simple" xlink:actuate="onRequest" xlink:title="Normal.dotm" xlink:href=""/>
  </office:meta>
</office:document-meta>
</file>