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cf67d" officeooo:paragraph-rsid="001cf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art dnia 28.05.26</text:p>
      <text:p text:style-name="Standard">CEL: GRA W STATKI</text:p>
      <text:p text:style-name="Standard"/>
      <text:p text:style-name="Standard">29.05 wybieranie miejsc statków przez gracza</text:p>
      <text:p text:style-name="P1">6.06 wybieranie miejsc statków przez komput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rek W</meta:initial-creator>
    <meta:editing-cycles>4</meta:editing-cycles>
    <meta:creation-date>2026-05-28T07:20:00</meta:creation-date>
    <dc:date>2026-06-06T22:26:28.607000000</dc:date>
    <meta:editing-duration>PT38M12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4" meta:word-count="19" meta:character-count="125" meta:non-whitespace-character-count="110"/>
    <meta:user-defined meta:name="AppVersion">12.0000</meta:user-defined>
    <meta:template xlink:type="simple" xlink:actuate="onRequest" xlink:title="Normal.dotm" xlink:href=""/>
  </office:meta>
</office:document-meta>
</file>